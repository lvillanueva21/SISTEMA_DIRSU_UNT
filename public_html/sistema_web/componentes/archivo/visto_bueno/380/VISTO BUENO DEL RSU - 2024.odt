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3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</style:style>
    <style:style style:name="T4" style:parent-style-name="Fuentedepárrafopredeter." style:family="text">
      <style:text-properties style:font-name="Arial" style:font-name-complex="Arial" fo:font-weight="bold" style:font-weight-asian="bold"/>
    </style:style>
    <style:style style:name="P5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6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7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8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9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0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1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2" style:parent-style-name="Normal" style:family="paragraph">
      <style:paragraph-properties fo:text-align="center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3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4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5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6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7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8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19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0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1" style:parent-style-name="Normal" style:family="paragraph">
      <style:paragraph-properties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2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3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4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name="P25" style:parent-style-name="Normal" style:family="paragraph">
      <style:paragraph-properties fo:text-align="justify" fo:margin-top="0.1666in" fo:margin-bottom="0.1666in" fo:margin-left="1.0833in" fo:text-indent="-0.6895in">
        <style:tab-stops/>
      </style:paragraph-properties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Trujillo, junio de 2024</text:p>
      <text:p text:style-name="P2"/>
      <text:p text:style-name="P3"><text:span text:style-name="T4"><draw:frame draw:style-name="a0" draw:name="Imagen 17" text:anchor-type="as-char" svg:x="0in" svg:y="0in" svg:width="1.04028in" svg:height="0.62639in" style:rel-width="scale" style:rel-height="scale"><draw:image xlink:href="media/image1.png" xlink:type="simple" xlink:show="embed" xlink:actuate="onLoad"/><svg:title/><svg:desc/></draw:frame></text:span></text:p>
      <text:p text:style-name="P5">Padilla Sagástegui Santos Enrique</text:p>
      <text:p text:style-name="P6">Código UNT: 2722</text:p>
      <text:p text:style-name="P7">Coordinador<text:s/></text:p>
      <text:p text:style-name="P8"/>
      <text:p text:style-name="P9"/>
      <text:p text:style-name="P10"/>
      <text:p text:style-name="P11"/>
      <text:p text:style-name="P12"/>
      <text:p text:style-name="P13">Nombre, firma y sello del representante<text:s/><text:tab/><text:tab/>Nombre, firma y sello del Director de<text:s/></text:p>
      <text:p text:style-name="P14">De Comité de Responsabilidad Social<text:tab/><text:tab/>de Departamento de CC. BB.<text:s/></text:p>
      <text:p text:style-name="P15"/>
      <text:p text:style-name="P16"/>
      <text:p text:style-name="P17"/>
      <text:p text:style-name="P18"/>
      <text:p text:style-name="P19"/>
      <text:p text:style-name="P20">Nombre, firma y sello del Decano<text:s/><text:tab/><text:tab/><text:tab/>Nombre. Firma y sello del Director de<text:s/></text:p>
      <text:p text:style-name="P21">De Ciencias Biológicas<text:s/><text:tab/><text:tab/><text:tab/><text:tab/>Responsabilidad Social Universitaria</text:p>
      <text:p text:style-name="P22"/>
      <text:p text:style-name="P23"/>
      <text:p text:style-name="P24"/>
      <text:p text:style-name="P2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Arial MT" style:font-name-asian="Arial MT" style:font-name-complex="Arial MT" style:letter-kerning="false" style:language-asian="es" style:country-asian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os enrique padilla sagástegui padilla sagástegui</meta:initial-creator>
    <dc:creator>santos enrique padilla sagástegui padilla sagástegui</dc:creator>
    <meta:creation-date>2025-01-10T00:25:00Z</meta:creation-date>
    <dc:date>2025-01-10T00:26:00Z</dc:date>
    <meta:template xlink:href="Normal" xlink:type="simple"/>
    <meta:editing-cycles>1</meta:editing-cycles>
    <meta:editing-duration>PT60S</meta:editing-duration>
    <meta:document-statistic meta:page-count="1" meta:paragraph-count="1" meta:word-count="60" meta:character-count="390" meta:row-count="2" meta:non-whitespace-character-count="331"/>
  </office:meta>
</office:document-meta>
</file>