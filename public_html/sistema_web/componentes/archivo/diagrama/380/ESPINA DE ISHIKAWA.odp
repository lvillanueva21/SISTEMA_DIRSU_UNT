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7">
      <style:graphic-properties draw:fill="none" draw:stroke="solid" svg:stroke-width="0.00694in" svg:stroke-color="#4472c4" draw:marker-end="a376" svg:stroke-opacity="100%" draw:stroke-linejoin="miter" svg:stroke-linecap="butt"/>
    </style:style>
    <style:style style:family="graphic" style:name="a604">
      <style:graphic-properties draw:fill="none" draw:stroke="solid" svg:stroke-width="0.00694in" svg:stroke-color="#4472c4" draw:marker-end="a603" svg:stroke-opacity="100%" draw:stroke-linejoin="miter" svg:stroke-linecap="butt"/>
    </style:style>
    <style:style style:family="graphic" style:name="a379">
      <style:graphic-properties draw:fill="none" draw:stroke="solid" svg:stroke-width="0.00694in" svg:stroke-color="#4472c4" draw:marker-end="a378" svg:stroke-opacity="100%" draw:stroke-linejoin="miter" svg:stroke-linecap="butt"/>
    </style:style>
    <style:style style:family="graphic" style:name="a606">
      <style:graphic-properties draw:fill="none" draw:stroke="solid" svg:stroke-width="0.00694in" svg:stroke-color="#4472c4" draw:marker-end="a605" svg:stroke-opacity="100%" draw:stroke-linejoin="miter" svg:stroke-linecap="butt"/>
    </style:style>
    <style:style style:family="graphic" style:name="a608">
      <style:graphic-properties draw:fill="none" draw:stroke="solid" svg:stroke-width="0.00694in" svg:stroke-color="#4472c4" draw:marker-end="a607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none" draw:stroke="solid" svg:stroke-width="0.00694in" svg:stroke-color="#4472c4" draw:marker-end="a380" svg:stroke-opacity="100%" draw:stroke-linejoin="miter" svg:stroke-linecap="butt"/>
    </style:style>
    <style:style style:family="graphic" style:name="a383">
      <style:graphic-properties draw:fill="none" draw:stroke="solid" svg:stroke-width="0.00694in" svg:stroke-color="#4472c4" draw:marker-end="a382" svg:stroke-opacity="100%" draw:stroke-linejoin="miter" svg:stroke-linecap="butt"/>
    </style:style>
    <style:style style:family="graphic" style:name="a610">
      <style:graphic-properties draw:fill="none" draw:stroke="solid" svg:stroke-width="0.00694in" svg:stroke-color="#4472c4" draw:marker-end="a609" svg:stroke-opacity="100%" draw:stroke-linejoin="miter" svg:stroke-linecap="butt"/>
    </style:style>
    <style:style style:family="graphic" style:name="a385">
      <style:graphic-properties draw:fill="none" draw:stroke="solid" svg:stroke-width="0.00694in" svg:stroke-color="#4472c4" draw:marker-end="a384" svg:stroke-opacity="100%" draw:stroke-linejoin="miter" svg:stroke-linecap="but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solid" svg:stroke-width="0.00694in" svg:stroke-color="#4472c4" draw:marker-end="a386" svg:stroke-opacity="100%" draw:stroke-linejoin="miter" svg:stroke-linecap="butt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0694in" svg:stroke-color="#4472c4" draw:marker-end="a388" svg:stroke-opacity="100%" draw:stroke-linejoin="miter" svg:stroke-linecap="butt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none" draw:stroke="solid" svg:stroke-width="0.00694in" svg:stroke-color="#4472c4" draw:marker-end="a390" svg:stroke-opacity="100%" draw:stroke-linejoin="miter" svg:stroke-linecap="butt"/>
    </style:style>
    <style:style style:family="graphic" style:name="a393">
      <style:graphic-properties draw:fill="none" draw:stroke="solid" svg:stroke-width="0.00694in" svg:stroke-color="#4472c4" draw:marker-end="a392" svg:stroke-opacity="100%" draw:stroke-linejoin="miter" svg:stroke-linecap="but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draw:fill="none" draw:stroke="solid" svg:stroke-width="0.00694in" svg:stroke-color="#4472c4" draw:marker-end="a394" svg:stroke-opacity="100%" draw:stroke-linejoin="miter" svg:stroke-linecap="butt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4">
      <style:graphic-properties draw:fill="none" draw:stroke="solid" svg:stroke-width="0.00694in" svg:stroke-color="#4472c4" draw:marker-end="a623" svg:stroke-opacity="100%" draw:stroke-linejoin="miter" svg:stroke-linecap="butt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draw:fill="none" draw:stroke="solid" svg:stroke-width="0.00694in" svg:stroke-color="#4472c4" draw:marker-end="a625" svg:stroke-opacity="100%" draw:stroke-linejoin="miter" svg:stroke-linecap="butt"/>
    </style:style>
    <style:style style:family="graphic" style:name="a628">
      <style:graphic-properties draw:fill="none" draw:stroke="solid" svg:stroke-width="0.00694in" svg:stroke-color="#4472c4" draw:marker-end="a627" svg:stroke-opacity="100%" draw:stroke-linejoin="miter" svg:stroke-linecap="butt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0694in" svg:stroke-color="#4472c4" draw:marker-end="a629" svg:stroke-opacity="100%" draw:stroke-linejoin="miter" svg:stroke-linecap="but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7">
      <style:graphic-properties draw:fill="none" draw:stroke="solid" svg:stroke-width="0.00694in" svg:stroke-color="#4472c4" draw:marker-end="a646" svg:stroke-opacity="100%" draw:stroke-linejoin="miter" svg:stroke-linecap="butt"/>
    </style:style>
    <style:style style:family="graphic" style:name="a649">
      <style:graphic-properties draw:fill="none" draw:stroke="solid" svg:stroke-width="0.00694in" svg:stroke-color="#4472c4" draw:marker-end="a648" svg:stroke-opacity="100%" draw:stroke-linejoin="miter" svg:stroke-linecap="but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draw:fill="none" draw:stroke="solid" svg:stroke-width="0.00694in" svg:stroke-color="#4472c4" draw:marker-end="a650" svg:stroke-opacity="100%" draw:stroke-linejoin="miter" svg:stroke-linecap="butt"/>
    </style:style>
    <style:style style:family="graphic" style:name="a653">
      <style:graphic-properties draw:fill="none" draw:stroke="solid" svg:stroke-width="0.00694in" svg:stroke-color="#4472c4" draw:marker-end="a652" svg:stroke-opacity="100%" draw:stroke-linejoin="miter" svg:stroke-linecap="butt"/>
    </style:style>
    <style:style style:family="graphic" style:name="a655">
      <style:graphic-properties draw:fill="none" draw:stroke="solid" svg:stroke-width="0.00694in" svg:stroke-color="#4472c4" draw:marker-end="a654" svg:stroke-opacity="100%" draw:stroke-linejoin="miter" svg:stroke-linecap="butt"/>
    </style:style>
    <style:style style:family="graphic" style:name="a657">
      <style:graphic-properties draw:fill="none" draw:stroke="solid" svg:stroke-width="0.00694in" svg:stroke-color="#4472c4" draw:marker-end="a656" svg:stroke-opacity="100%" draw:stroke-linejoin="miter" svg:stroke-linecap="butt"/>
    </style:style>
    <style:style style:family="graphic" style:name="a659">
      <style:graphic-properties draw:fill="none" draw:stroke="solid" svg:stroke-width="0.00694in" svg:stroke-color="#4472c4" draw:marker-end="a658" svg:stroke-opacity="100%" draw:stroke-linejoin="miter" svg:stroke-linecap="butt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9">
      <style:graphic-properties draw:fill="none" draw:stroke="solid" svg:stroke-width="0.00694in" svg:stroke-color="#4472c4" draw:marker-end="a678" svg:stroke-opacity="100%" draw:stroke-linejoin="miter" svg:stroke-linecap="but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1">
      <style:graphic-properties draw:fill="none" draw:stroke="solid" svg:stroke-width="0.00694in" svg:stroke-color="#4472c4" draw:marker-end="a680" svg:stroke-opacity="100%" draw:stroke-linejoin="miter" svg:stroke-linecap="butt"/>
    </style:style>
    <style:style style:family="graphic" style:name="a683">
      <style:graphic-properties draw:fill="none" draw:stroke="solid" svg:stroke-width="0.00694in" svg:stroke-color="#4472c4" draw:marker-end="a682" svg:stroke-opacity="100%" draw:stroke-linejoin="miter" svg:stroke-linecap="butt"/>
    </style:style>
    <style:style style:family="graphic" style:name="a685">
      <style:graphic-properties draw:fill="none" draw:stroke="solid" svg:stroke-width="0.00694in" svg:stroke-color="#4472c4" draw:marker-end="a684" svg:stroke-opacity="100%" draw:stroke-linejoin="miter" svg:stroke-linecap="butt"/>
    </style:style>
    <style:style style:family="graphic" style:name="a687">
      <style:graphic-properties draw:fill="none" draw:stroke="solid" svg:stroke-width="0.00694in" svg:stroke-color="#4472c4" draw:marker-end="a686" svg:stroke-opacity="100%" draw:stroke-linejoin="miter" svg:stroke-linecap="butt"/>
    </style:style>
    <style:style style:family="graphic" style:name="a689">
      <style:graphic-properties draw:fill="none" draw:stroke="solid" svg:stroke-width="0.00694in" svg:stroke-color="#4472c4" draw:marker-end="a688" svg:stroke-opacity="100%" draw:stroke-linejoin="miter" svg:stroke-linecap="but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none" draw:stroke="solid" svg:stroke-width="0.00694in" svg:stroke-color="#4472c4" draw:marker-end="a690" svg:stroke-opacity="100%" draw:stroke-linejoin="miter" svg:stroke-linecap="butt"/>
    </style:style>
    <style:style style:family="graphic" style:name="a693">
      <style:graphic-properties draw:fill="none" draw:stroke="solid" svg:stroke-width="0.00694in" svg:stroke-color="#4472c4" draw:marker-end="a692" svg:stroke-opacity="100%" draw:stroke-linejoin="miter" svg:stroke-linecap="butt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37">
      <style:graphic-properties draw:fill="none" draw:stroke="solid" svg:stroke-width="0.08333in" svg:stroke-color="#000000" draw:marker-end="a336" svg:stroke-opacity="100%" draw:stroke-linejoin="miter" svg:stroke-linecap="butt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4167in" svg:stroke-color="#000000" draw:marker-end="a338" svg:stroke-opacity="100%" draw:stroke-linejoin="miter" svg:stroke-linecap="butt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none" draw:stroke="solid" svg:stroke-width="0.04167in" svg:stroke-color="#000000" draw:marker-end="a340" svg:stroke-opacity="100%" draw:stroke-linejoin="miter" svg:stroke-linecap="butt"/>
    </style:style>
    <style:style style:family="graphic" style:name="a343">
      <style:graphic-properties draw:fill="none" draw:stroke="solid" svg:stroke-width="0.04167in" svg:stroke-color="#000000" draw:marker-end="a342" svg:stroke-opacity="100%" draw:stroke-linejoin="miter" svg:stroke-linecap="butt"/>
    </style:style>
    <style:style style:family="graphic" style:name="a345">
      <style:graphic-properties draw:fill="none" draw:stroke="solid" svg:stroke-width="0.04167in" svg:stroke-color="#000000" draw:marker-end="a344" svg:stroke-opacity="100%" draw:stroke-linejoin="miter" svg:stroke-linecap="butt"/>
    </style:style>
    <style:style style:family="graphic" style:name="a347">
      <style:graphic-properties draw:fill="none" draw:stroke="solid" svg:stroke-width="0.04167in" svg:stroke-color="#000000" draw:marker-end="a346" svg:stroke-opacity="100%" draw:stroke-linejoin="miter" svg:stroke-linecap="butt"/>
    </style:style>
    <style:style style:family="text" style:name="a3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ffde5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4">
      <text:list-level-style-number text:level="1" style:num-format="1" style:num-suffix="." style:num-list-format-name="" text:start-value="14">
        <style:list-level-properties text:space-before="0in" text:min-label-width="0.25in"/>
        <style:text-properties fo:font-size="100%"/>
      </text:list-level-style-number>
      <text:list-level-style-number text:level="2" style:num-format="1" style:num-suffix="." style:num-list-format-name="" text:start-value="14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 style:num-list-format-name="" text:start-value="14">
        <style:list-level-properties text:space-before="1in" text:min-label-width="0.25in"/>
        <style:text-properties fo:font-size="100%"/>
      </text:list-level-style-number>
      <text:list-level-style-number text:level="4" style:num-format="1" style:num-suffix="." style:num-list-format-name="" text:start-value="14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 style:num-list-format-name="" text:start-value="14">
        <style:list-level-properties text:space-before="2in" text:min-label-width="0.25in"/>
        <style:text-properties fo:font-size="100%"/>
      </text:list-level-style-number>
      <text:list-level-style-number text:level="6" style:num-format="1" style:num-suffix="." style:num-list-format-name="" text:start-value="14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 style:num-list-format-name="" text:start-value="14">
        <style:list-level-properties text:space-before="3in" text:min-label-width="0.25in"/>
        <style:text-properties fo:font-size="100%"/>
      </text:list-level-style-number>
      <text:list-level-style-number text:level="8" style:num-format="1" style:num-suffix="." style:num-list-format-name="" text:start-value="14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 style:num-list-format-name="" text:start-value="14">
        <style:list-level-properties text:space-before="4in" text:min-label-width="0.25in"/>
        <style:text-properties fo:font-size="100%"/>
      </text:list-level-style-number>
    </text:list-style>
  </office:automatic-styles>
  <office:body>
    <office:presentation>
      <draw:page draw:name="Slide2" draw:style-name="a335" draw:master-page-name="Master1-Layout7-blank-En-blanco" presentation:presentation-page-layout-name="Master1-PPL7" draw:id="Slide-257">
        <draw:connector draw:type="line" svg:x1="0.85333in" svg:y1="3.26667in" svg:x2="7.46667in" svg:y2="3.26667in" draw:id="id63" draw:style-name="a337" draw:name="Conector recto de flecha 2">
          <svg:title/>
          <svg:desc/>
        </draw:connector>
        <draw:connector draw:type="line" svg:x1="2.13333in" svg:y1="1.13333in" svg:x2="3.25333in" svg:y2="3.21333in" draw:id="id64" draw:style-name="a339" draw:name="Conector recto de flecha 4">
          <svg:title/>
          <svg:desc/>
        </draw:connector>
        <draw:connector draw:type="line" svg:x1="3.48in" svg:y1="0.92in" svg:x2="4.84in" svg:y2="3.26667in" draw:id="id65" draw:style-name="a341" draw:name="Conector recto de flecha 6">
          <svg:title/>
          <svg:desc/>
        </draw:connector>
        <draw:connector draw:type="line" svg:x1="4.93333in" svg:y1="0.82667in" svg:x2="6.4in" svg:y2="3.21333in" draw:id="id66" draw:style-name="a343" draw:name="Conector recto de flecha 8">
          <svg:title/>
          <svg:desc/>
        </draw:connector>
        <draw:connector draw:type="line" svg:x1="1.86667in" svg:y1="5.52in" svg:x2="3.96in" svg:y2="3.26667in" draw:id="id67" draw:style-name="a345" draw:name="Conector recto de flecha 15">
          <svg:title/>
          <svg:desc/>
        </draw:connector>
        <draw:connector draw:type="line" svg:x1="4.09333in" svg:y1="5.85333in" svg:x2="5.72in" svg:y2="3.32in" draw:id="id68" draw:style-name="a347" draw:name="Conector recto de flecha 17">
          <svg:title/>
          <svg:desc/>
        </draw:connector>
        <draw:custom-shape svg:x="0.04in" svg:y="2.62667in" svg:width="0.94667in" svg:height="1.28in" draw:id="id69" draw:style-name="a350" draw:name="Rectángulo 18">
          <svg:title/>
          <svg:desc/>
          <text:p text:style-name="a349" text:class-names="" text:cond-style-name=""><text:span text:style-name="a348" text:class-names="">Títul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in" svg:y="2.62667in" svg:width="1.96in" svg:height="1.12333in" draw:id="id70" draw:style-name="a357" draw:name="Elipse 19">
          <svg:title/>
          <svg:desc/>
          <text:p text:style-name="a356" text:class-names="" text:cond-style-name=""><text:span text:style-name="a351" text:class-names="">Resultado</text:span><text:span text:style-name="a352" text:class-names="">s</text:span><text:span text:style-name="a353" text:class-names=""><text:s text:c="1"/></text:span><text:span text:style-name="a354" text:class-names="">distorsionados</text:span><text:span text:style-name="a3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1" draw:style-name="a360" draw:name="CuadroTexto 20" svg:x="1.21333in" svg:y="0.65333in" svg:width="1.12in" svg:height="0.40391in">
          <draw:text-box>
            <text:p text:style-name="a359" text:class-names="" text:cond-style-name=""><text:span text:style-name="a358" text:class-names="">Diseño</text:span></text:p>
          </draw:text-box>
          <svg:title/>
          <svg:desc/>
        </draw:frame>
        <draw:frame draw:id="id72" draw:style-name="a363" draw:name="CuadroTexto 21" svg:x="2.97333in" svg:y="0.54667in" svg:width="1.21333in" svg:height="0.40391in">
          <draw:text-box>
            <text:p text:style-name="a362" text:class-names="" text:cond-style-name=""><text:span text:style-name="a361" text:class-names="">Personas</text:span></text:p>
          </draw:text-box>
          <svg:title/>
          <svg:desc/>
        </draw:frame>
        <draw:frame draw:id="id73" draw:style-name="a366" draw:name="CuadroTexto 22" svg:x="4.70667in" svg:y="0.54667in" svg:width="1.46667in" svg:height="0.40391in">
          <draw:text-box>
            <text:p text:style-name="a365" text:class-names="" text:cond-style-name=""><text:span text:style-name="a364" text:class-names="">Desarrollo</text:span></text:p>
          </draw:text-box>
          <svg:title/>
          <svg:desc/>
        </draw:frame>
        <draw:frame draw:id="id74" draw:style-name="a369" draw:name="CuadroTexto 23" svg:x="0.69333in" svg:y="5.61333in" svg:width="2in" svg:height="0.40391in">
          <draw:text-box>
            <text:p text:style-name="a368" text:class-names="" text:cond-style-name=""><text:span text:style-name="a367" text:class-names="">Metodología</text:span></text:p>
          </draw:text-box>
          <svg:title/>
          <svg:desc/>
        </draw:frame>
        <draw:frame draw:id="id75" draw:style-name="a372" draw:name="CuadroTexto 24" svg:x="3.48in" svg:y="5.85333in" svg:width="1.73333in" svg:height="0.40391in">
          <draw:text-box>
            <text:p text:style-name="a371" text:class-names="" text:cond-style-name=""><text:span text:style-name="a370" text:class-names="">Herramientas</text:span></text:p>
          </draw:text-box>
          <svg:title/>
          <svg:desc/>
        </draw:frame>
        <draw:frame draw:id="id76" draw:style-name="a375" draw:name="CuadroTexto 25" svg:x="0.22667in" svg:y="0.08in" svg:width="3.72in" svg:height="0.40391in">
          <draw:text-box>
            <text:p text:style-name="a374" text:class-names="" text:cond-style-name=""><text:span text:style-name="a373" text:class-names="">ESPINA DE ISHIKAWA</text:span></text:p>
          </draw:text-box>
          <svg:title/>
          <svg:desc/>
        </draw:frame>
        <draw:connector draw:type="line" svg:x1="0.85333in" svg:y1="1.32in" svg:x2="2.2in" svg:y2="1.32in" draw:id="id77" draw:style-name="a377" draw:name="Conector recto de flecha 27">
          <svg:title/>
          <svg:desc/>
        </draw:connector>
        <draw:connector draw:type="line" svg:x1="2.81333in" svg:y1="1.42667in" svg:x2="2.33333in" svg:y2="1.42667in" draw:id="id78" draw:style-name="a379" draw:name="Conector recto de flecha 29">
          <svg:title/>
          <svg:desc/>
        </draw:connector>
        <draw:connector draw:type="line" svg:x1="1.10667in" svg:y1="1.68in" svg:x2="2.33333in" svg:y2="1.68in" draw:id="id79" draw:style-name="a381" draw:name="Conector recto de flecha 31">
          <svg:title/>
          <svg:desc/>
        </draw:connector>
        <draw:connector draw:type="line" svg:x1="2.86333in" svg:y1="1.77333in" svg:x2="2.52333in" svg:y2="1.77333in" draw:id="id80" draw:style-name="a383" draw:name="Conector recto de flecha 33">
          <svg:title/>
          <svg:desc/>
        </draw:connector>
        <draw:connector draw:type="line" svg:x1="1.41333in" svg:y1="2.05in" svg:x2="2.57333in" svg:y2="2.02in" draw:id="id81" draw:style-name="a385" draw:name="Conector recto de flecha 35">
          <svg:title/>
          <svg:desc/>
        </draw:connector>
        <draw:connector draw:type="line" svg:x1="3.13333in" svg:y1="2.19833in" svg:x2="2.72in" svg:y2="2.17333in" draw:id="id82" draw:style-name="a387" draw:name="Conector recto de flecha 38">
          <svg:title/>
          <svg:desc/>
        </draw:connector>
        <draw:connector draw:type="line" svg:x1="1.53167in" svg:y1="2.3025in" svg:x2="2.755in" svg:y2="2.29167in" draw:id="id83" draw:style-name="a389" draw:name="Conector recto de flecha 40">
          <svg:title/>
          <svg:desc/>
        </draw:connector>
        <draw:connector draw:type="line" svg:x1="3.34667in" svg:y1="2.45in" svg:x2="2.86333in" svg:y2="2.44125in" draw:id="id84" draw:style-name="a391" draw:name="Conector recto de flecha 44">
          <svg:title/>
          <svg:desc/>
        </draw:connector>
        <draw:connector draw:type="line" svg:x1="1.77333in" svg:y1="2.65396in" svg:x2="2.91333in" svg:y2="2.65396in" draw:id="id85" draw:style-name="a393" draw:name="Conector recto de flecha 46">
          <svg:title/>
          <svg:desc/>
        </draw:connector>
        <draw:connector draw:type="line" svg:x1="3.62in" svg:y1="2.78729in" svg:x2="3.01333in" svg:y2="2.78729in" draw:id="id86" draw:style-name="a395" draw:name="Conector recto de flecha 48">
          <svg:title/>
          <svg:desc/>
        </draw:connector>
        <draw:frame draw:id="id87" draw:style-name="a572" draw:name="CuadroTexto 49" svg:x="9.22in" svg:y="0.26667in" svg:width="3.88667in" svg:height="7.64056in">
          <draw:text-box>
            <text:p text:style-name="a397" text:class-names="" text:cond-style-name=""><text:span text:style-name="a396" text:class-names="">LEYENDA</text:span></text:p>
            <text:p text:style-name="a399" text:class-names="" text:cond-style-name=""><text:span text:style-name="a398" text:class-names=""/></text:p>
            <text:p text:style-name="a401" text:class-names="" text:cond-style-name=""><text:span text:style-name="a400" text:class-names="">Diseño</text:span></text:p>
            <text:p text:style-name="a406" text:class-names="" text:cond-style-name=""><text:span text:style-name="a402" text:class-names="">1.. Objetivos<text:tab/><text:tab/>6,<text:s text:c="1"/></text:span><text:span text:style-name="a403" text:class-names="">Deficiente</text:span><text:span text:style-name="a404" text:class-names=""><text:s text:c="1"/></text:span><text:span text:style-name="a405" text:class-names="">ejecución</text:span></text:p>
            <text:p text:style-name="a413" text:class-names="" text:cond-style-name=""><text:span text:style-name="a407" text:class-names="">2..Tipo de proyecto<text:tab/></text:span><text:span text:style-name="a408" text:class-names=""><text:s text:c="1"/>inadecuado</text:span><text:span text:style-name="a409" text:class-names=""><text:tab/>7, <text:s text:c="1"/></text:span><text:span text:style-name="a410" text:class-names="">sin f</text:span><text:span text:style-name="a411" text:class-names="">ases<text:s text:c="1"/></text:span><text:span text:style-name="a412" text:class-names="">del proyecto</text:span></text:p>
            <text:p text:style-name="a421" text:class-names="" text:cond-style-name=""><text:span text:style-name="a414" text:class-names="">3.Grupos de<text:s text:c="1"/></text:span><text:span text:style-name="a415" text:class-names="">interés</text:span><text:span text:style-name="a416" text:class-names=""><text:s text:c="1"/>no correctos</text:span><text:span text:style-name="a417" text:class-names=""><text:tab/>8.<text:s text:c="1"/></text:span><text:span text:style-name="a418" text:class-names="">solo un n</text:span><text:span text:style-name="a419" text:class-names="">ivel<text:s text:c="1"/></text:span><text:span text:style-name="a420" text:class-names="">disciplinar</text:span></text:p>
            <text:p text:style-name="a433" text:class-names="" text:cond-style-name=""><text:span text:style-name="a422" text:class-names="">4.<text:s text:c="1"/></text:span><text:span text:style-name="a423" text:class-names="">Sin n</text:span><text:span text:style-name="a424" text:class-names="">ecesidades<text:s text:c="1"/></text:span><text:span text:style-name="a425" text:class-names="">de<text:s text:c="1"/></text:span><text:span text:style-name="a426" text:class-names="">grupos<text:s text:c="1"/></text:span><text:span text:style-name="a427" text:class-names="">de interés. 9.<text:s text:c="1"/></text:span><text:span text:style-name="a428" text:class-names="">No indica<text:s text:c="1"/></text:span><text:span text:style-name="a429" text:class-names="">ejecutor</text:span><text:span text:style-name="a430" text:class-names="">e</text:span><text:span text:style-name="a431" text:class-names="">s</text:span><text:span text:style-name="a432" text:class-names=""/></text:p>
            <text:p text:style-name="a441" text:class-names="" text:cond-style-name=""><text:span text:style-name="a434" text:class-names="">5. <text:s text:c="1"/>Institución y población<text:s text:c="1"/></text:span><text:span text:style-name="a435" text:class-names="">no</text:span><text:span text:style-name="a436" text:class-names=""><text:s text:c="1"/></text:span><text:span text:style-name="a437" text:class-names="">interactúan. <text:s text:c="1"/>10.<text:s text:c="1"/></text:span><text:span text:style-name="a438" text:class-names="">Cronograma</text:span><text:span text:style-name="a439" text:class-names=""><text:s text:c="1"/>impreciso</text:span><text:span text:style-name="a440" text:class-names=""/></text:p>
            <text:p text:style-name="a443" text:class-names="" text:cond-style-name=""><text:span text:style-name="a442" text:class-names="">Personas<text:s text:c="1"/></text:span></text:p>
            <text:p text:style-name="a449" text:class-names="" text:cond-style-name=""><text:span text:style-name="a444" text:class-names="">11.<text:s text:c="1"/></text:span><text:span text:style-name="a445" text:class-names="">Responsables del<text:s text:c="1"/></text:span><text:span text:style-name="a446" text:class-names="">proyecto</text:span><text:span text:style-name="a447" text:class-names=""><text:s text:c="1"/>no definidos</text:span><text:span text:style-name="a448" text:class-names=""/></text:p>
            <text:p text:style-name="a454" text:class-names="" text:cond-style-name=""><text:span text:style-name="a450" text:class-names="">12. <text:s text:c="1"/>Docentes integrantes del<text:s text:c="1"/></text:span><text:span text:style-name="a451" text:class-names="">equipo</text:span><text:span text:style-name="a452" text:class-names=""><text:s text:c="1"/>no participan a plenitud</text:span><text:span text:style-name="a453" text:class-names=""/></text:p>
            <text:p text:style-name="a459" text:class-names="" text:cond-style-name=""><text:span text:style-name="a455" text:class-names="">13. <text:s text:c="1"/></text:span><text:span text:style-name="a456" text:class-names="">Administrativos</text:span><text:span text:style-name="a457" text:class-names=""><text:s text:c="1"/>nunca participan aún siendo avisados</text:span><text:span text:style-name="a458" text:class-names=""/></text:p>
            <text:list text:style-name="a464">
              <text:list-item>
                <text:p text:style-name="a463" text:class-names="" text:cond-style-name=""><text:span text:style-name="a460" text:class-names="">Estudiantes</text:span><text:span text:style-name="a461" text:class-names=""><text:s text:c="1"/>no participan</text:span><text:span text:style-name="a462" text:class-names=""/></text:p>
              </text:list-item>
            </text:list>
            <text:p text:style-name="a466" text:class-names="" text:cond-style-name=""><text:span text:style-name="a465" text:class-names="">Metodología</text:span></text:p>
            <text:p text:style-name="a471" text:class-names="" text:cond-style-name=""><text:span text:style-name="a467" text:class-names="">15. Implementación de material<text:s text:c="1"/></text:span><text:span text:style-name="a468" text:class-names="">bibliográfico</text:span><text:span text:style-name="a469" text:class-names=""><text:s text:c="1"/>no adecuados</text:span><text:span text:style-name="a470" text:class-names=""/></text:p>
            <text:p text:style-name="a476" text:class-names="" text:cond-style-name=""><text:span text:style-name="a472" text:class-names="">16. Identificación de<text:s text:c="1"/></text:span><text:span text:style-name="a473" text:class-names="">beneficiarios</text:span><text:span text:style-name="a474" text:class-names=""><text:s text:c="1"/>no definidos</text:span><text:span text:style-name="a475" text:class-names=""/></text:p>
            <text:p text:style-name="a481" text:class-names="" text:cond-style-name=""><text:span text:style-name="a477" text:class-names="">17.<text:s text:c="1"/></text:span><text:span text:style-name="a478" text:class-names="">Ni se hace s</text:span><text:span text:style-name="a479" text:class-names="">ocialización<text:s text:c="1"/></text:span><text:span text:style-name="a480" text:class-names="">y sensibilización de beneficiarios</text:span></text:p>
            <text:p text:style-name="a486" text:class-names="" text:cond-style-name=""><text:span text:style-name="a482" text:class-names="">18. Recolección de<text:s text:c="1"/></text:span><text:span text:style-name="a483" text:class-names="">información</text:span><text:span text:style-name="a484" text:class-names=""><text:s text:c="1"/>inoportuna</text:span><text:span text:style-name="a485" text:class-names=""/></text:p>
            <text:p text:style-name="a488" text:class-names="" text:cond-style-name=""><text:span text:style-name="a487" text:class-names="">Desarrollo</text:span></text:p>
            <text:p text:style-name="a493" text:class-names="" text:cond-style-name=""><text:span text:style-name="a489" text:class-names="">19.<text:s text:c="1"/></text:span><text:span text:style-name="a490" text:class-names="">No se hacen c</text:span><text:span text:style-name="a491" text:class-names="">harlas<text:s text:c="1"/></text:span><text:span text:style-name="a492" text:class-names="">a beneficiarios</text:span></text:p>
            <text:p text:style-name="a503" text:class-names="" text:cond-style-name=""><text:span text:style-name="a494" text:class-names="">20.<text:s text:c="1"/></text:span><text:span text:style-name="a495" text:class-names="">No hay manejo de c</text:span><text:span text:style-name="a496" text:class-names="">ultivos<text:s text:c="1"/></text:span><text:span text:style-name="a497" text:class-names="">de<text:s text:c="1"/></text:span><text:span text:style-name="a498" text:class-names="">Phaseolus</text:span><text:span text:style-name="a499" text:class-names=""><text:s text:c="1"/></text:span><text:span text:style-name="a500" text:class-names="">vulgaris</text:span><text:span text:style-name="a501" text:class-names=""><text:s text:c="1"/></text:span><text:span text:style-name="a502" text:class-names="">“pallar moche”</text:span></text:p>
            <text:p text:style-name="a511" text:class-names="" text:cond-style-name=""><text:span text:style-name="a504" text:class-names="">21.<text:s text:c="1"/></text:span><text:span text:style-name="a505" text:class-names="">Los datos</text:span><text:span text:style-name="a506" text:class-names=""><text:s text:c="1"/></text:span><text:span text:style-name="a507" text:class-names="">de plantas<text:s text:c="1"/></text:span><text:span text:style-name="a508" text:class-names="">cultivadas</text:span><text:span text:style-name="a509" text:class-names=""><text:s text:c="1"/>no son ordenados ni organizados</text:span><text:span text:style-name="a510" text:class-names=""/></text:p>
            <text:p text:style-name="a516" text:class-names="" text:cond-style-name=""><text:span text:style-name="a512" text:class-names="">22. Análisis de<text:s text:c="1"/></text:span><text:span text:style-name="a513" text:class-names="">datos</text:span><text:span text:style-name="a514" text:class-names=""><text:s text:c="1"/>inadecuados</text:span><text:span text:style-name="a515" text:class-names=""/></text:p>
            <text:p text:style-name="a521" text:class-names="" text:cond-style-name=""><text:span text:style-name="a517" text:class-names="">23. Obtención de<text:s text:c="1"/></text:span><text:span text:style-name="a518" text:class-names="">resultados</text:span><text:span text:style-name="a519" text:class-names=""><text:s text:c="1"/>no confiables</text:span><text:span text:style-name="a520" text:class-names=""/></text:p>
            <text:p text:style-name="a526" text:class-names="" text:cond-style-name=""><text:span text:style-name="a522" text:class-names="">24. Interpretación de<text:s text:c="1"/></text:span><text:span text:style-name="a523" text:class-names="">resultados</text:span><text:span text:style-name="a524" text:class-names=""><text:s text:c="1"/>erróneos</text:span><text:span text:style-name="a525" text:class-names=""/></text:p>
            <text:p text:style-name="a533" text:class-names="" text:cond-style-name=""><text:span text:style-name="a527" text:class-names="">25.</text:span><text:span text:style-name="a528" text:class-names=""><text:s text:c="1"/></text:span><text:span text:style-name="a529" text:class-names="">Presentación del<text:s text:c="1"/></text:span><text:span text:style-name="a530" text:class-names="">informe</text:span><text:span text:style-name="a531" text:class-names=""><text:s text:c="1"/>incompleto</text:span><text:span text:style-name="a532" text:class-names=""/></text:p>
            <text:p text:style-name="a535" text:class-names="" text:cond-style-name=""><text:span text:style-name="a534" text:class-names="">Herramientas</text:span></text:p>
            <text:p text:style-name="a544" text:class-names="" text:cond-style-name=""><text:span text:style-name="a536" text:class-names="">26.<text:s text:c="1"/></text:span><text:span text:style-name="a537" text:class-names="">O</text:span><text:span text:style-name="a538" text:class-names="">bjetivos</text:span><text:span text:style-name="a539" text:class-names=""><text:s text:c="1"/>sin claridad</text:span><text:span text:style-name="a540" text:class-names=""><text:tab/>30.<text:s text:c="1"/></text:span><text:span text:style-name="a541" text:class-names="">Inadecuada m</text:span><text:span text:style-name="a542" text:class-names="">etodología<text:s text:c="1"/></text:span><text:span text:style-name="a543" text:class-names=""/></text:p>
            <text:p text:style-name="a552" text:class-names="" text:cond-style-name=""><text:span text:style-name="a545" text:class-names="">27. Metas<text:s text:c="1"/></text:span><text:span text:style-name="a546" text:class-names="">planteadas</text:span><text:span text:style-name="a547" text:class-names=""><text:s text:c="1"/>sin claridad</text:span><text:span text:style-name="a548" text:class-names=""><text:tab/>31.<text:s text:c="1"/></text:span><text:span text:style-name="a549" text:class-names="">Presupuesto</text:span><text:span text:style-name="a550" text:class-names=""><text:s text:c="1"/>deficiente</text:span><text:span text:style-name="a551" text:class-names=""/></text:p>
            <text:p text:style-name="a559" text:class-names="" text:cond-style-name=""><text:span text:style-name="a553" text:class-names="">28. <text:s text:c="1"/>Fuentes de<text:s text:c="1"/></text:span><text:span text:style-name="a554" text:class-names="">variación no precisas</text:span><text:span text:style-name="a555" text:class-names=""><text:tab/>32.<text:s text:c="1"/></text:span><text:span text:style-name="a556" text:class-names="">Bienes</text:span><text:span text:style-name="a557" text:class-names=""><text:s text:c="1"/>no utilizables</text:span><text:span text:style-name="a558" text:class-names=""/></text:p>
            <text:p text:style-name="a567" text:class-names="" text:cond-style-name=""><text:span text:style-name="a560" text:class-names="">29. Datos<text:s text:c="1"/></text:span><text:span text:style-name="a561" text:class-names="">obtenidos no<text:s text:c="1"/></text:span><text:span text:style-name="a562" text:class-names="">confiables<text:s text:c="1"/></text:span><text:span text:style-name="a563" text:class-names=""><text:tab/>33.<text:s text:c="1"/></text:span><text:span text:style-name="a564" text:class-names="">Servicios</text:span><text:span text:style-name="a565" text:class-names=""><text:s text:c="1"/>inadecuados</text:span><text:span text:style-name="a566" text:class-names=""/></text:p>
            <text:p text:style-name="a569" text:class-names="" text:cond-style-name=""><text:span text:style-name="a568" text:class-names=""/></text:p>
            <text:p text:style-name="a571" text:class-names="" text:cond-style-name=""><text:span text:style-name="a570" text:class-names=""/></text:p>
          </draw:text-box>
          <svg:title/>
          <svg:desc/>
        </draw:frame>
        <draw:frame draw:id="id88" draw:style-name="a575" draw:name="CuadroTexto 50" svg:x="0.57333in" svg:y="1.04in" svg:width="1.12in" svg:height="0.40391in">
          <draw:text-box>
            <text:p text:style-name="a574" text:class-names="" text:cond-style-name=""><text:span text:style-name="a573" text:class-names="">1</text:span></text:p>
          </draw:text-box>
          <svg:title/>
          <svg:desc/>
        </draw:frame>
        <draw:frame draw:id="id89" draw:style-name="a578" draw:name="CuadroTexto 51" svg:x="2.57in" svg:y="1.11805in" svg:width="0.845in" svg:height="0.40391in">
          <draw:text-box>
            <text:p text:style-name="a577" text:class-names="" text:cond-style-name=""><text:span text:style-name="a576" text:class-names="">2</text:span></text:p>
          </draw:text-box>
          <svg:title/>
          <svg:desc/>
        </draw:frame>
        <draw:frame draw:id="id90" draw:style-name="a581" draw:name="CuadroTexto 52" svg:x="0.86333in" svg:y="1.45628in" svg:width="1.48in" svg:height="0.30293in">
          <draw:text-box>
            <text:p text:style-name="a580" text:class-names="" text:cond-style-name=""><text:span text:style-name="a579" text:class-names="">3</text:span></text:p>
          </draw:text-box>
          <svg:title/>
          <svg:desc/>
        </draw:frame>
        <draw:frame draw:id="id91" draw:style-name="a584" draw:name="CuadroTexto 53" svg:x="2.64333in" svg:y="1.57863in" svg:width="0.54in" svg:height="0.30293in">
          <draw:text-box>
            <text:p text:style-name="a583" text:class-names="" text:cond-style-name=""><text:span text:style-name="a582" text:class-names="">4</text:span></text:p>
          </draw:text-box>
          <svg:title/>
          <svg:desc/>
        </draw:frame>
        <draw:frame draw:id="id92" draw:style-name="a587" draw:name="CuadroTexto 54" svg:x="1.11917in" svg:y="1.84436in" svg:width="0.57417in" svg:height="0.30293in">
          <draw:text-box>
            <text:p text:style-name="a586" text:class-names="" text:cond-style-name=""><text:span text:style-name="a585" text:class-names="">5</text:span></text:p>
          </draw:text-box>
          <svg:title/>
          <svg:desc/>
        </draw:frame>
        <draw:frame draw:id="id93" draw:style-name="a590" draw:name="CuadroTexto 55" svg:x="2.98667in" svg:y="1.94265in" svg:width="0.60667in" svg:height="0.40391in">
          <draw:text-box>
            <text:p text:style-name="a589" text:class-names="" text:cond-style-name=""><text:span text:style-name="a588" text:class-names="">6</text:span></text:p>
          </draw:text-box>
          <svg:title/>
          <svg:desc/>
        </draw:frame>
        <draw:frame draw:id="id94" draw:style-name="a593" draw:name="CuadroTexto 56" svg:x="1.19833in" svg:y="2.09333in" svg:width="0.48in" svg:height="0.40391in">
          <draw:text-box>
            <text:p text:style-name="a592" text:class-names="" text:cond-style-name=""><text:span text:style-name="a591" text:class-names="">7</text:span></text:p>
          </draw:text-box>
          <svg:title/>
          <svg:desc/>
        </draw:frame>
        <draw:frame draw:id="id95" draw:style-name="a596" draw:name="CuadroTexto 57" svg:x="3.31917in" svg:y="2.20935in" svg:width="0.42167in" svg:height="0.40391in">
          <draw:text-box>
            <text:p text:style-name="a595" text:class-names="" text:cond-style-name=""><text:span text:style-name="a594" text:class-names="">8</text:span></text:p>
          </draw:text-box>
          <svg:title/>
          <svg:desc/>
        </draw:frame>
        <draw:frame draw:id="id96" draw:style-name="a599" draw:name="CuadroTexto 58" svg:x="1.45167in" svg:y="2.42709in" svg:width="0.65333in" svg:height="0.40391in">
          <draw:text-box>
            <text:p text:style-name="a598" text:class-names="" text:cond-style-name=""><text:span text:style-name="a597" text:class-names="">9</text:span></text:p>
          </draw:text-box>
          <svg:title/>
          <svg:desc/>
        </draw:frame>
        <draw:frame draw:id="id97" draw:style-name="a602" draw:name="CuadroTexto 59" svg:x="3.53in" svg:y="2.61326in" svg:width="0.65333in" svg:height="0.40391in">
          <draw:text-box>
            <text:p text:style-name="a601" text:class-names="" text:cond-style-name=""><text:span text:style-name="a600" text:class-names="">10</text:span></text:p>
          </draw:text-box>
          <svg:title/>
          <svg:desc/>
        </draw:frame>
        <draw:connector draw:type="line" svg:x1="3.27083in" svg:y1="1.47984in" svg:x2="3.8025in" svg:y2="1.49396in" draw:id="id98" draw:style-name="a604" draw:name="Conector recto de flecha 61">
          <svg:title/>
          <svg:desc/>
        </draw:connector>
        <draw:connector draw:type="line" svg:x1="3.85667in" svg:y1="2.61326in" draw:start-shape="id97" draw:start-glue-point="0" svg:x2="4.3775in" svg:y2="2.62667in" draw:id="id99" draw:style-name="a606" draw:name="Conector recto de flecha 63">
          <svg:title/>
          <svg:desc/>
        </draw:connector>
        <draw:connector draw:type="line" svg:x1="4.585in" svg:y1="1.82667in" svg:x2="4.03958in" svg:y2="1.82667in" draw:id="id100" draw:style-name="a608" draw:name="Conector recto de flecha 65">
          <svg:title/>
          <svg:desc/>
        </draw:connector>
        <draw:connector draw:type="line" svg:x1="5.06667in" svg:y1="2.82333in" svg:x2="4.62083in" svg:y2="2.82333in" draw:id="id101" draw:style-name="a610" draw:name="Conector recto de flecha 67">
          <svg:title/>
          <svg:desc/>
        </draw:connector>
        <draw:frame draw:id="id102" draw:style-name="a613" draw:name="CuadroTexto 68" svg:x="3.1175in" svg:y="1.18667in" svg:width="0.48in" svg:height="0.40391in">
          <draw:text-box>
            <text:p text:style-name="a612" text:class-names="" text:cond-style-name=""><text:span text:style-name="a611" text:class-names="">11</text:span></text:p>
          </draw:text-box>
          <svg:title/>
          <svg:desc/>
        </draw:frame>
        <draw:frame draw:id="id103" draw:style-name="a616" draw:name="CuadroTexto 69" svg:x="4.28667in" svg:y="1.52737in" svg:width="0.55438in" svg:height="0.40391in">
          <draw:text-box>
            <text:p text:style-name="a615" text:class-names="" text:cond-style-name=""><text:span text:style-name="a614" text:class-names="">12</text:span></text:p>
          </draw:text-box>
          <svg:title/>
          <svg:desc/>
        </draw:frame>
        <draw:frame draw:id="id104" draw:style-name="a619" draw:name="CuadroTexto 70" svg:x="3.62in" svg:y="2.29167in" svg:width="0.66in" svg:height="0.40391in">
          <draw:text-box>
            <text:p text:style-name="a618" text:class-names="" text:cond-style-name=""><text:span text:style-name="a617" text:class-names="">13</text:span></text:p>
          </draw:text-box>
          <svg:title/>
          <svg:desc/>
        </draw:frame>
        <draw:frame draw:id="id105" draw:style-name="a622" draw:name="CuadroTexto 71" svg:x="4.70667in" svg:y="2.49724in" svg:width="0.55438in" svg:height="0.40391in">
          <draw:text-box>
            <text:p text:style-name="a621" text:class-names="" text:cond-style-name=""><text:span text:style-name="a620" text:class-names="">14</text:span></text:p>
          </draw:text-box>
          <svg:title/>
          <svg:desc/>
        </draw:frame>
        <draw:connector draw:type="line" svg:x1="1.21333in" svg:y1="4.97333in" svg:x2="2.34333in" svg:y2="4.97333in" draw:id="id106" draw:style-name="a624" draw:name="Conector recto de flecha 73">
          <svg:title/>
          <svg:desc/>
        </draw:connector>
        <draw:connector draw:type="line" svg:x1="3.34667in" svg:y1="4.73333in" svg:x2="2.64333in" svg:y2="4.73333in" draw:id="id107" draw:style-name="a626" draw:name="Conector recto de flecha 75">
          <svg:title/>
          <svg:desc/>
        </draw:connector>
        <draw:connector draw:type="line" svg:x1="2.105in" svg:y1="4.08in" svg:x2="3.1175in" svg:y2="4.08in" draw:id="id108" draw:style-name="a628" draw:name="Conector recto de flecha 77">
          <svg:title/>
          <svg:desc/>
        </draw:connector>
        <draw:connector draw:type="line" svg:x1="4.09333in" svg:y1="3.75in" svg:x2="3.53in" svg:y2="3.75in" draw:id="id109" draw:style-name="a630" draw:name="Conector recto de flecha 79">
          <svg:title/>
          <svg:desc/>
        </draw:connector>
        <draw:frame draw:id="id110" draw:style-name="a633" draw:name="CuadroTexto 80" svg:x="0.98667in" svg:y="4.52in" svg:width="0.545in" svg:height="0.40391in">
          <draw:text-box>
            <text:p text:style-name="a632" text:class-names="" text:cond-style-name=""><text:span text:style-name="a631" text:class-names="">15</text:span></text:p>
          </draw:text-box>
          <svg:title/>
          <svg:desc/>
        </draw:frame>
        <draw:frame draw:id="id111" draw:style-name="a636" draw:name="CuadroTexto 81" svg:x="3.15in" svg:y="4.40156in" svg:width="0.82667in" svg:height="0.40391in">
          <draw:text-box>
            <text:p text:style-name="a635" text:class-names="" text:cond-style-name=""><text:span text:style-name="a634" text:class-names="">16</text:span></text:p>
          </draw:text-box>
          <svg:title/>
          <svg:desc/>
        </draw:frame>
        <draw:frame draw:id="id112" draw:style-name="a639" draw:name="CuadroTexto 82" svg:x="1.60333in" svg:y="3.75in" svg:width="0.56333in" svg:height="0.40391in">
          <draw:text-box>
            <text:p text:style-name="a638" text:class-names="" text:cond-style-name=""><text:span text:style-name="a637" text:class-names="">17</text:span></text:p>
          </draw:text-box>
          <svg:title/>
          <svg:desc/>
        </draw:frame>
        <draw:frame draw:id="id113" draw:style-name="a642" draw:name="CuadroTexto 83" svg:x="4.03958in" svg:y="3.50667in" svg:width="0.57375in" svg:height="0.40391in">
          <draw:text-box>
            <text:p text:style-name="a641" text:class-names="" text:cond-style-name=""><text:span text:style-name="a640" text:class-names="">18</text:span></text:p>
          </draw:text-box>
          <svg:title/>
          <svg:desc/>
        </draw:frame>
        <draw:frame draw:id="id114" draw:style-name="a645" draw:name="CuadroTexto 84" svg:x="5.48583in" svg:y="0.99812in" svg:width="0.46833in" svg:height="0.40391in">
          <draw:text-box>
            <text:p text:style-name="a644" text:class-names="" text:cond-style-name=""><text:span text:style-name="a643" text:class-names="">20</text:span></text:p>
          </draw:text-box>
          <svg:title/>
          <svg:desc/>
        </draw:frame>
        <draw:connector draw:type="line" svg:x1="6.14in" svg:y1="1.36235in" svg:x2="5.26104in" svg:y2="1.38624in" draw:id="id115" draw:style-name="a647" draw:name="Conector recto de flecha 86">
          <svg:title/>
          <svg:desc/>
        </draw:connector>
        <draw:connector draw:type="line" svg:x1="4.3775in" svg:y1="1.18667in" svg:x2="5.06667in" svg:y2="1.18667in" draw:id="id116" draw:style-name="a649" draw:name="Conector recto de flecha 89">
          <svg:title/>
          <svg:desc/>
        </draw:connector>
        <draw:connector draw:type="line" svg:x1="4.90667in" svg:y1="1.94265in" svg:x2="5.48583in" svg:y2="1.93127in" draw:id="id117" draw:style-name="a651" draw:name="Conector recto de flecha 91">
          <svg:title/>
          <svg:desc/>
        </draw:connector>
        <draw:connector draw:type="line" svg:x1="6.50906in" svg:y1="1.99583in" svg:x2="5.66667in" svg:y2="2.04203in" draw:id="id118" draw:style-name="a653" draw:name="Conector recto de flecha 93">
          <svg:title/>
          <svg:desc/>
        </draw:connector>
        <draw:connector draw:type="line" svg:x1="4.98385in" svg:y1="2.49724in" draw:start-shape="id105" draw:start-glue-point="0" svg:x2="5.95417in" svg:y2="2.45803in" draw:id="id119" draw:style-name="a655" draw:name="Conector recto de flecha 96">
          <svg:title/>
          <svg:desc/>
        </draw:connector>
        <draw:connector draw:type="line" svg:x1="6.66667in" svg:y1="2.61326in" svg:x2="6.08786in" svg:y2="2.61326in" draw:id="id120" draw:style-name="a657" draw:name="Conector recto de flecha 99">
          <svg:title/>
          <svg:desc/>
        </draw:connector>
        <draw:connector draw:type="line" svg:x1="5.44in" svg:y1="2.90115in" svg:x2="6.17333in" svg:y2="2.90115in" draw:id="id121" draw:style-name="a659" draw:name="Conector recto de flecha 101">
          <svg:title/>
          <svg:desc/>
        </draw:connector>
        <draw:frame draw:id="id122" draw:style-name="a662" draw:name="CuadroTexto 102" svg:x="4.18333in" svg:y="0.85529in" svg:width="0.80052in" svg:height="0.40391in">
          <draw:text-box>
            <text:p text:style-name="a661" text:class-names="" text:cond-style-name=""><text:span text:style-name="a660" text:class-names="">19</text:span></text:p>
          </draw:text-box>
          <svg:title/>
          <svg:desc/>
        </draw:frame>
        <draw:frame draw:id="id123" draw:style-name="a665" draw:name="CuadroTexto 103" svg:x="4.84in" svg:y="1.59057in" svg:width="0.64583in" svg:height="0.40391in">
          <draw:text-box>
            <text:p text:style-name="a664" text:class-names="" text:cond-style-name=""><text:span text:style-name="a663" text:class-names="">21</text:span></text:p>
          </draw:text-box>
          <svg:title/>
          <svg:desc/>
        </draw:frame>
        <draw:frame draw:id="id124" draw:style-name="a668" draw:name="CuadroTexto 104" svg:x="5.95417in" svg:y="1.59057in" svg:width="0.6725in" svg:height="0.40391in">
          <draw:text-box>
            <text:p text:style-name="a667" text:class-names="" text:cond-style-name=""><text:span text:style-name="a666" text:class-names="">22</text:span></text:p>
          </draw:text-box>
          <svg:title/>
          <svg:desc/>
        </draw:frame>
        <draw:frame draw:id="id125" draw:style-name="a671" draw:name="CuadroTexto 105" svg:x="5.06667in" svg:y="2.14729in" svg:width="0.59333in" svg:height="0.40391in">
          <draw:text-box>
            <text:p text:style-name="a670" text:class-names="" text:cond-style-name=""><text:span text:style-name="a669" text:class-names="">23</text:span></text:p>
          </draw:text-box>
          <svg:title/>
          <svg:desc/>
        </draw:frame>
        <draw:frame draw:id="id126" draw:style-name="a674" draw:name="CuadroTexto 106" svg:x="6.17333in" svg:y="2.29167in" svg:width="0.71167in" svg:height="0.40391in">
          <draw:text-box>
            <text:p text:style-name="a673" text:class-names="" text:cond-style-name=""><text:span text:style-name="a672" text:class-names="">24</text:span></text:p>
          </draw:text-box>
          <svg:title/>
          <svg:desc/>
        </draw:frame>
        <draw:frame draw:id="id127" draw:style-name="a677" draw:name="CuadroTexto 107" svg:x="5.48583in" svg:y="2.61326in" svg:width="0.58854in" svg:height="0.40391in">
          <draw:text-box>
            <text:p text:style-name="a676" text:class-names="" text:cond-style-name=""><text:span text:style-name="a675" text:class-names="">25</text:span></text:p>
          </draw:text-box>
          <svg:title/>
          <svg:desc/>
        </draw:frame>
        <draw:connector draw:type="line" svg:x1="3.415in" svg:y1="5.61333in" svg:x2="4.28in" svg:y2="5.61333in" draw:id="id128" draw:style-name="a679" draw:name="Conector recto de flecha 109">
          <svg:title/>
          <svg:desc/>
        </draw:connector>
        <draw:connector draw:type="line" svg:x1="5.26104in" svg:y1="5.38667in" svg:x2="4.3775in" svg:y2="5.38667in" draw:id="id129" draw:style-name="a681" draw:name="Conector recto de flecha 111">
          <svg:title/>
          <svg:desc/>
        </draw:connector>
        <draw:connector draw:type="line" svg:x1="3.94667in" svg:y1="4.97333in" svg:x2="4.62083in" svg:y2="4.97333in" draw:id="id130" draw:style-name="a683" draw:name="Conector recto de flecha 114">
          <svg:title/>
          <svg:desc/>
        </draw:connector>
        <draw:connector draw:type="line" svg:x1="5.44in" svg:y1="4.73333in" svg:x2="4.84in" svg:y2="4.73333in" draw:id="id131" draw:style-name="a685" draw:name="Conector recto de flecha 116">
          <svg:title/>
          <svg:desc/>
        </draw:connector>
        <draw:connector draw:type="line" svg:x1="4.28in" svg:y1="4.15391in" svg:x2="5.21333in" svg:y2="4.15391in" draw:id="id132" draw:style-name="a687" draw:name="Conector recto de flecha 118">
          <svg:title/>
          <svg:desc/>
        </draw:connector>
        <draw:connector draw:type="line" svg:x1="5.82667in" svg:y1="3.90667in" svg:x2="5.44in" svg:y2="3.90667in" draw:id="id133" draw:style-name="a689" draw:name="Conector recto de flecha 120">
          <svg:title/>
          <svg:desc/>
        </draw:connector>
        <draw:connector draw:type="line" svg:x1="4.90667in" svg:y1="3.62667in" svg:x2="5.48583in" svg:y2="3.62667in" draw:id="id134" draw:style-name="a691" draw:name="Conector recto de flecha 122">
          <svg:title/>
          <svg:desc/>
        </draw:connector>
        <draw:connector draw:type="line" svg:x1="6.17333in" svg:y1="3.50667in" svg:x2="5.66in" svg:y2="3.50667in" draw:id="id135" draw:style-name="a693" draw:name="Conector recto de flecha 124">
          <svg:title/>
          <svg:desc/>
        </draw:connector>
        <draw:frame draw:id="id136" draw:style-name="a696" draw:name="CuadroTexto 125" svg:x="3.62in" svg:y="5.25333in" svg:width="0.54667in" svg:height="0.40391in">
          <draw:text-box>
            <text:p text:style-name="a695" text:class-names="" text:cond-style-name=""><text:span text:style-name="a694" text:class-names="">26</text:span></text:p>
          </draw:text-box>
          <svg:title/>
          <svg:desc/>
        </draw:frame>
        <draw:frame draw:id="id137" draw:style-name="a699" draw:name="CuadroTexto 126" svg:x="4.93333in" svg:y="4.97333in" svg:width="0.63in" svg:height="0.40391in">
          <draw:text-box>
            <text:p text:style-name="a698" text:class-names="" text:cond-style-name=""><text:span text:style-name="a697" text:class-names="">27</text:span></text:p>
          </draw:text-box>
          <svg:title/>
          <svg:desc/>
        </draw:frame>
        <draw:frame draw:id="id138" draw:style-name="a702" draw:name="CuadroTexto 127" svg:x="3.98667in" svg:y="4.66805in" svg:width="0.53667in" svg:height="0.40391in">
          <draw:text-box>
            <text:p text:style-name="a701" text:class-names="" text:cond-style-name=""><text:span text:style-name="a700" text:class-names="">28</text:span></text:p>
          </draw:text-box>
          <svg:title/>
          <svg:desc/>
        </draw:frame>
        <draw:frame draw:id="id139" draw:style-name="a705" draw:name="CuadroTexto 128" svg:x="5.36333in" svg:y="4.40156in" svg:width="0.51in" svg:height="0.40391in">
          <draw:text-box>
            <text:p text:style-name="a704" text:class-names="" text:cond-style-name=""><text:span text:style-name="a703" text:class-names="">29</text:span></text:p>
          </draw:text-box>
          <svg:title/>
          <svg:desc/>
        </draw:frame>
        <draw:frame draw:id="id140" draw:style-name="a708" draw:name="CuadroTexto 129" svg:x="4.5175in" svg:y="3.85805in" svg:width="0.52167in" svg:height="0.40391in">
          <draw:text-box>
            <text:p text:style-name="a707" text:class-names="" text:cond-style-name=""><text:span text:style-name="a706" text:class-names="">30</text:span></text:p>
          </draw:text-box>
          <svg:title/>
          <svg:desc/>
        </draw:frame>
        <draw:frame draw:id="id141" draw:style-name="a711" draw:name="CuadroTexto 130" svg:x="5.87333in" svg:y="3.75in" svg:width="0.56667in" svg:height="0.40391in">
          <draw:text-box>
            <text:p text:style-name="a710" text:class-names="" text:cond-style-name=""><text:span text:style-name="a709" text:class-names="">31</text:span></text:p>
          </draw:text-box>
          <svg:title/>
          <svg:desc/>
        </draw:frame>
        <draw:frame draw:id="id142" draw:style-name="a714" draw:name="CuadroTexto 131" svg:x="4.70667in" svg:y="3.32in" svg:width="0.5in" svg:height="0.40391in">
          <draw:text-box>
            <text:p text:style-name="a713" text:class-names="" text:cond-style-name=""><text:span text:style-name="a712" text:class-names="">32</text:span></text:p>
          </draw:text-box>
          <svg:title/>
          <svg:desc/>
        </draw:frame>
        <draw:frame draw:id="id143" draw:style-name="a717" draw:name="CuadroTexto 132" svg:x="6.28in" svg:y="3.32in" svg:width="0.48667in" svg:height="0.40391in">
          <draw:text-box>
            <text:p text:style-name="a716" text:class-names="" text:cond-style-name=""><text:span text:style-name="a715" text:class-names="">33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09" svg:viewBox="0 0 20 30" svg:d="m10 0-10 30h20z"/>
    <draw:marker draw:name="a654" svg:viewBox="0 0 20 30" svg:d="m10 0-10 30h20z"/>
    <draw:marker draw:name="a656" svg:viewBox="0 0 20 30" svg:d="m10 0-10 30h20z"/>
    <draw:marker draw:name="a658" svg:viewBox="0 0 20 30" svg:d="m10 0-10 30h20z"/>
    <draw:marker draw:name="a623" svg:viewBox="0 0 20 30" svg:d="m10 0-10 30h20z"/>
    <draw:marker draw:name="a336" svg:viewBox="0 0 20 30" svg:d="m10 0-10 30h20z"/>
    <draw:marker draw:name="a625" svg:viewBox="0 0 20 30" svg:d="m10 0-10 30h20z"/>
    <draw:marker draw:name="a380" svg:viewBox="0 0 20 30" svg:d="m10 0-10 30h20z"/>
    <draw:marker draw:name="a338" svg:viewBox="0 0 20 30" svg:d="m10 0-10 30h20z"/>
    <draw:marker draw:name="a627" svg:viewBox="0 0 20 30" svg:d="m10 0-10 30h20z"/>
    <draw:marker draw:name="a382" svg:viewBox="0 0 20 30" svg:d="m10 0-10 30h20z"/>
    <draw:marker draw:name="a384" svg:viewBox="0 0 20 30" svg:d="m10 0-10 30h20z"/>
    <draw:marker draw:name="a629" svg:viewBox="0 0 20 30" svg:d="m10 0-10 30h20z"/>
    <draw:marker draw:name="a386" svg:viewBox="0 0 20 30" svg:d="m10 0-10 30h20z"/>
    <draw:marker draw:name="a388" svg:viewBox="0 0 20 30" svg:d="m10 0-10 30h20z"/>
    <draw:marker draw:name="a678" svg:viewBox="0 0 20 30" svg:d="m10 0-10 30h20z"/>
    <draw:marker draw:name="a646" svg:viewBox="0 0 20 30" svg:d="m10 0-10 30h20z"/>
    <draw:marker draw:name="a690" svg:viewBox="0 0 20 30" svg:d="m10 0-10 30h20z"/>
    <draw:marker draw:name="a648" svg:viewBox="0 0 20 30" svg:d="m10 0-10 30h20z"/>
    <draw:marker draw:name="a692" svg:viewBox="0 0 20 30" svg:d="m10 0-10 30h20z"/>
    <draw:marker draw:name="a376" svg:viewBox="0 0 20 30" svg:d="m10 0-10 30h20z"/>
    <draw:marker draw:name="a340" svg:viewBox="0 0 20 30" svg:d="m10 0-10 30h20z"/>
    <draw:marker draw:name="a378" svg:viewBox="0 0 20 30" svg:d="m10 0-10 30h20z"/>
    <draw:marker draw:name="a342" svg:viewBox="0 0 20 30" svg:d="m10 0-10 30h20z"/>
    <draw:marker draw:name="a344" svg:viewBox="0 0 20 30" svg:d="m10 0-10 30h20z"/>
    <draw:marker draw:name="a346" svg:viewBox="0 0 20 30" svg:d="m10 0-10 30h20z"/>
    <draw:marker draw:name="a390" svg:viewBox="0 0 20 30" svg:d="m10 0-10 30h20z"/>
    <draw:marker draw:name="a680" svg:viewBox="0 0 20 30" svg:d="m10 0-10 30h20z"/>
    <draw:marker draw:name="a392" svg:viewBox="0 0 20 30" svg:d="m10 0-10 30h20z"/>
    <draw:marker draw:name="a682" svg:viewBox="0 0 20 30" svg:d="m10 0-10 30h20z"/>
    <draw:marker draw:name="a394" svg:viewBox="0 0 20 30" svg:d="m10 0-10 30h20z"/>
    <draw:marker draw:name="a603" svg:viewBox="0 0 20 30" svg:d="m10 0-10 30h20z"/>
    <draw:marker draw:name="a684" svg:viewBox="0 0 20 30" svg:d="m10 0-10 30h20z"/>
    <draw:marker draw:name="a605" svg:viewBox="0 0 20 30" svg:d="m10 0-10 30h20z"/>
    <draw:marker draw:name="a686" svg:viewBox="0 0 20 30" svg:d="m10 0-10 30h20z"/>
    <draw:marker draw:name="a650" svg:viewBox="0 0 20 30" svg:d="m10 0-10 30h20z"/>
    <draw:marker draw:name="a607" svg:viewBox="0 0 20 30" svg:d="m10 0-10 30h20z"/>
    <draw:marker draw:name="a688" svg:viewBox="0 0 20 30" svg:d="m10 0-10 30h20z"/>
    <draw:marker draw:name="a65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1/2025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Haga clic para modificar el estilo de título del patrón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Haga clic para modificar el estilo de subtítulo del patrón</text:span></text:p>
        </draw:text-box>
        <svg:title/>
        <svg:desc/>
      </draw:frame>
      <draw:frame draw:id="id7" presentation:style-name="a40" draw:name="Marcador de fech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01/2025</text:date></text:span></text:p>
        </draw:text-box>
        <svg:title/>
        <svg:desc/>
      </draw:frame>
      <draw:frame draw:id="id8" presentation:style-name="a43" draw:name="Marcador de pie de pá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número de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1" presentation:style-name="a66" draw:name="Marcador de conteni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Haga clic para modificar los estilos de texto del patró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fech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01/2025</text:date></text:span></text:p>
        </draw:text-box>
        <svg:title/>
        <svg:desc/>
      </draw:frame>
      <draw:frame draw:id="id13" presentation:style-name="a73" draw:name="Marcador de pie de pá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número de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Haga clic para modificar el estilo de título del patrón</text:span></text:p>
        </draw:text-box>
        <svg:title/>
        <svg:desc/>
      </draw:frame>
      <draw:frame draw:id="id16" presentation:style-name="a84" draw:name="Marcador de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88" draw:name="Marcador de fech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01/2025</text:date></text:span></text:p>
        </draw:text-box>
        <svg:title/>
        <svg:desc/>
      </draw:frame>
      <draw:frame draw:id="id18" presentation:style-name="a91" draw:name="Marcador de pie de pá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número de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Haga clic para modificar el estilo de título del patrón</text:span></text:p>
        </draw:text-box>
        <svg:title/>
        <svg:desc/>
      </draw:frame>
      <draw:frame draw:id="id21" presentation:style-name="a114" draw:name="Marcador de conteni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Haga clic para modificar los estilos de texto del patró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conteni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fech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01/2025</text:date></text:span></text:p>
        </draw:text-box>
        <svg:title/>
        <svg:desc/>
      </draw:frame>
      <draw:frame draw:id="id24" presentation:style-name="a137" draw:name="Marcador de pie de pá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Haga clic para modificar el estilo de título del patrón</text:span></text:p>
        </draw:text-box>
        <svg:title/>
        <svg:desc/>
      </draw:frame>
      <draw:frame draw:id="id27" presentation:style-name="a148" draw:name="Marcador de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64" draw:name="Marcador de conteni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Haga clic para modificar los estilos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84" draw:name="Marcador de conteni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Haga clic para modificar los estilos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fech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01/2025</text:date></text:span></text:p>
        </draw:text-box>
        <svg:title/>
        <svg:desc/>
      </draw:frame>
      <draw:frame draw:id="id32" presentation:style-name="a191" draw:name="Marcador de pie de pá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número de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Haga clic para modificar el estilo de título del patrón</text:span></text:p>
        </draw:text-box>
        <svg:title/>
        <svg:desc/>
      </draw:frame>
      <draw:frame draw:id="id35" presentation:style-name="a202" draw:name="Marcador de fech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01/2025</text:date></text:span></text:p>
        </draw:text-box>
        <svg:title/>
        <svg:desc/>
      </draw:frame>
      <draw:frame draw:id="id36" presentation:style-name="a205" draw:name="Marcador de pie de pá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número de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09">
      <draw:frame draw:id="id38" presentation:style-name="a213" draw:name="Marcador de fech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01/2025</text:date></text:span></text:p>
        </draw:text-box>
        <svg:title/>
        <svg:desc/>
      </draw:frame>
      <draw:frame draw:id="id39" presentation:style-name="a216" draw:name="Marcador de pie de pá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número de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42" presentation:style-name="a239" draw:name="Marcador de conteni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los estilos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47" draw:name="Marcador de fech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01/2025</text:date></text:span></text:p>
        </draw:text-box>
        <svg:title/>
        <svg:desc/>
      </draw:frame>
      <draw:frame draw:id="id45" presentation:style-name="a250" draw:name="Marcador de pie de pá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número de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Haga clic para modificar el estilo de título del patrón</text:span></text:p>
        </draw:text-box>
        <svg:title/>
        <svg:desc/>
      </draw:frame>
      <draw:frame draw:id="id48" presentation:style-name="a260" draw:name="Marcador de posición de imagen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01/2025</text:date></text:span></text:p>
        </draw:text-box>
        <svg:title/>
        <svg:desc/>
      </draw:frame>
      <draw:frame draw:id="id51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Haga clic para modificar el estilo de título del patrón</text:span></text:p>
        </draw:text-box>
        <svg:title/>
        <svg:desc/>
      </draw:frame>
      <draw:frame draw:id="id54" presentation:style-name="a294" draw:name="Marcador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los estilos de texto del patró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fech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01/2025</text:date></text:span></text:p>
        </draw:text-box>
        <svg:title/>
        <svg:desc/>
      </draw:frame>
      <draw:frame draw:id="id56" presentation:style-name="a301" draw:name="Marcador de pie de pá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número de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Haga clic para modificar el estilo de título del patrón</text:span></text:p>
        </draw:text-box>
        <svg:title/>
        <svg:desc/>
      </draw:frame>
      <draw:frame draw:id="id59" presentation:style-name="a324" draw:name="Marcador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Haga clic para modificar los estilos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fech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01/2025</text:date></text:span></text:p>
        </draw:text-box>
        <svg:title/>
        <svg:desc/>
      </draw:frame>
      <draw:frame draw:id="id61" presentation:style-name="a331" draw:name="Marcador de pie de pá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número de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antos enrique padilla sagástegui padilla sagástegui</meta:initial-creator>
    <dc:creator>santos enrique padilla sagástegui padilla sagástegui</dc:creator>
    <meta:creation-date>2025-01-09T00:18:46Z</meta:creation-date>
    <dc:date>2025-01-10T16:42:46Z</dc:date>
    <meta:editing-cycles>2</meta:editing-cycles>
    <meta:editing-duration>PT1040S</meta:editing-duration>
    <meta:document-statistic meta:paragraph-count="72" meta:word-count="277"/>
  </office:meta>
</office:document-meta>
</file>